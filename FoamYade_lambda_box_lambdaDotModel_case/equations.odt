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(λ_spring)/dt = 0.5 * (λDot_i + λDot_j)</text:p>
      <text:p text:style-name="P1"/>
      <text:p text:style-name="P1"/>
      <text:p text:style-name="P1">λ_spring(t+dt) = λ_spring(t) + dt * 0.5 * (lambdaDot_i + lambdaDot_j)</text:p>
      <text:p text:style-name="P1"/>
      <text:p text:style-name="P1">L_target = L0 * λ_spring(t)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8T10:30:49.285004112</meta:creation-date>
    <dc:date>2025-12-01T09:50:03.632545676</dc:date>
    <meta:editing-duration>P2DT23H9M4S</meta:editing-duration>
    <meta:editing-cycles>1</meta:editing-cycles>
    <meta:document-statistic meta:table-count="0" meta:image-count="0" meta:object-count="0" meta:page-count="1" meta:paragraph-count="3" meta:word-count="23" meta:character-count="136" meta:non-whitespace-character-count="116"/>
    <meta:generator>LibreOffice/7.3.7.2$Linux_X86_64 LibreOffice_project/30$Build-2</meta:generator>
  </office:meta>
</office:document-meta>
</file>